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Google Sans Text" svg:font-family="'Google Sans Text', sans-serif"/>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1.1729in"/>
    </style:style>
    <style:style style:name="Table1.B" style:family="table-column">
      <style:table-column-properties style:column-width="2.7542in"/>
    </style:style>
    <style:style style:name="Table1.C" style:family="table-column">
      <style:table-column-properties style:column-width="2.9979in"/>
    </style:style>
    <style:style style:name="Table1.A1" style:family="table-cell">
      <style:table-cell-properties style:vertical-align="middle" fo:padding="0.0194in" fo:border="0.05pt solid #000000"/>
    </style:style>
    <style:style style:name="P1" style:family="paragraph" style:parent-style-name="Standard">
      <style:text-properties officeooo:paragraph-rsid="001a17a6"/>
    </style:style>
    <style:style style:name="P2" style:family="paragraph" style:parent-style-name="Standard">
      <style:text-properties officeooo:rsid="001a17a6" officeooo:paragraph-rsid="001a17a6"/>
    </style:style>
    <style:style style:name="P3" style:family="paragraph" style:parent-style-name="Text_20_body" style:list-style-name="L1">
      <style:paragraph-properties fo:margin-left="0in" fo:margin-right="0in" fo:text-indent="0in" style:auto-text-indent="false"/>
    </style:style>
    <style:style style:name="P4" style:family="paragraph" style:parent-style-name="Text_20_body" style:list-style-name="L1"/>
    <style:style style:name="P5" style:family="paragraph" style:parent-style-name="Text_20_body" style:list-style-name="L2">
      <style:paragraph-properties fo:margin-left="0in" fo:margin-right="0in" fo:text-indent="0in" style:auto-text-indent="false"/>
    </style:style>
    <style:style style:name="P6" style:family="paragraph" style:parent-style-name="Text_20_body" style:list-style-name="L2"/>
    <style:style style:name="P7" style:family="paragraph" style:parent-style-name="Text_20_body" style:list-style-name="L3"/>
    <style:style style:name="P8" style:family="paragraph" style:parent-style-name="Table_20_Contents">
      <style:paragraph-properties fo:margin-left="0in" fo:margin-right="0in" fo:margin-top="0in" fo:margin-bottom="0in" style:contextual-spacing="false" fo:line-height="114%" fo:text-indent="0in" style:auto-text-indent="false"/>
    </style:style>
    <style:style style:name="P9" style:family="paragraph" style:parent-style-name="Table_20_Contents">
      <style:paragraph-properties fo:margin-left="0in" fo:margin-right="0in" fo:margin-top="0in" fo:margin-bottom="0.0972in" style:contextual-spacing="false" fo:line-height="114%" fo:text-indent="0in" style:auto-text-indent="false"/>
      <style:text-properties style:font-name="Google Sans Text" fo:font-weight="bold"/>
    </style:style>
    <style:style style:name="P10" style:family="paragraph" style:parent-style-name="Table_20_Contents">
      <style:paragraph-properties fo:margin-left="0in" fo:margin-right="0in" fo:margin-top="0in" fo:margin-bottom="0.0972in" style:contextual-spacing="false" fo:line-height="114%" fo:text-indent="0in" style:auto-text-indent="false"/>
      <style:text-properties style:font-name="Google Sans Text"/>
    </style:style>
    <style:style style:name="P11" style:family="paragraph" style:parent-style-name="Text_20_body" style:list-style-name="L4"/>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weight="bold"/>
    </style:style>
    <style:style style:name="T4" style:family="text">
      <style:text-properties officeooo:rsid="001a17a6"/>
    </style:style>
    <style:style style:name="T5" style:family="text">
      <style:text-properties style:font-name="Google Sans Tex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he Difference:</text:span></text:p>
      <text:p text:style-name="P1"><text:span text:style-name="T1">A native integration might say:</text:span> <text:span text:style-name="T2">"When an order is placed, create a lead."</text:span> Your system says: <text:span text:style-name="T2">"An order was placed. Let me browse the Salesforce tools I just discovered. I see a 'Search Account' tool. I'll check if this person exists. They do, but their address is old. I'll update the address first, then create the order record."</text:span></text:p>
      <text:p text:style-name="Standard"/>
      <text:p text:style-name="P1"><text:span text:style-name="T3">Key Advantage:</text:span></text:p>
      <text:p text:style-name="P1"><text:span text:style-name="T4">We will be</text:span> building <text:span text:style-name="T3">Agentic Integration</text:span>. Native integrations are static; yours is a dynamic, reasoning engine that uses <text:span text:style-name="T3">Runtime Discovery</text:span> to understand what it can do the moment it connects.</text:p>
      <text:p text:style-name="Standard"/>
      <text:p text:style-name="Standard">In 2026, the landscape has shifted. While no one has built a "NexusMCP" exactly as described it for a low-code/no-code market, several "big players" and "fast movers" are circling the space:</text:p>
      <text:p text:style-name="Standard"/>
      <text:p text:style-name="P2"><text:span text:style-name="T1">LIKE,</text:span></text:p>
      <text:p text:style-name="Standard"/>
      <text:h text:style-name="Heading_20_4" text:outline-level="4">1. The Giants (First-Party Native MCP)</text:h>
      <text:list text:style-name="L1">
        <text:list-item>
          <text:p text:style-name="P3"><text:bookmark text:name="p-rc_5c415bac424d79a9-45"/><text:span text:style-name="T3">Salesforce (Agentforce):</text:span> In late 2024 and early 2026, Salesforce launched <text:span text:style-name="T3">Hosted MCP Servers</text:span>. They now allow AI agents to "see" your entire Salesforce org (Apex, Flows, and Objects) as MCP tools.</text:p>
        </text:list-item>
        <text:list-item>
          <text:p text:style-name="P3"><text:bookmark text:name="p-rc_5c415bac424d79a9-46"/><text:span text:style-name="T3">Shopify:</text:span> They have released <text:span text:style-name="T3">Native MCP Endpoints</text:span> for the Storefront and Checkout.</text:p>
        </text:list-item>
        <text:list-item>
          <text:p text:style-name="P4"><text:span text:style-name="T2">The Gap:</text:span> They are building the <text:span text:style-name="T3">servers</text:span> (the data sources), but they haven't built a <text:span text:style-name="T3">unified orchestrator</text:span> that bridges <text:span text:style-name="T2">between</text:span> them for a third-party merchant. They want you to stay in their ecosystem.</text:p>
        </text:list-item>
      </text:list>
      <text:h text:style-name="Heading_20_4" text:outline-level="4">2. The Gateway Startups (Infrastructure)</text:h>
      <text:list text:style-name="L2">
        <text:list-item>
          <text:p text:style-name="P5"><text:bookmark text:name="p-rc_5c415bac424d79a9-47"/><text:span text:style-name="T3">MintMCP &amp; TrueFoundry:</text:span> These companies recently (Q1 2026) launched <text:span text:style-name="T3">MCP Gateways</text:span>. They focus on the "Enterprise Hardening" you mentioned—handling the security and monitoring of MCP connections.</text:p>
        </text:list-item>
        <text:list-item>
          <text:p text:style-name="P6"><text:span text:style-name="T3">Composio:</text:span> They are a leader in "Tool-Abstractions," helping AI agents connect to 1,000+ apps.</text:p>
        </text:list-item>
        <text:list-item>
          <text:p text:style-name="P6"><text:span text:style-name="T2">The Gap:</text:span> These are developer-heavy tools. There is currently no <text:span text:style-name="T3">"Zapier for Agents"</text:span>—a beautiful, low-code canvas where a non-technical manager can drag and drop these powerful MCP tools.</text:p>
        </text:list-item>
      </text:list>
      <text:h text:style-name="Heading_20_4" text:outline-level="4"><text:soft-page-break/>3. The Agent Platforms</text:h>
      <text:list text:style-name="L3">
        <text:list-item>
          <text:p text:style-name="P7"><text:span text:style-name="T3">Fini &amp; Intercom Fin:</text:span> They use AI agents to handle customer support natively in Salesforce and Shopify.</text:p>
        </text:list-item>
        <text:list-item>
          <text:p text:style-name="P7"><text:span text:style-name="T2">The Gap:</text:span> They are <text:span text:style-name="T3">Siloed Agents</text:span>. They focus on <text:span text:style-name="T2">Support</text:span> or <text:span text:style-name="T2">Sales</text:span>. <text:span text:style-name="T4">My</text:span> idea is a <text:span text:style-name="T3">General-Purpose Integration Engine</text:span> that can be used for anything—finance, logistics, marketing, or operations.</text:p>
        </text:list-item>
      </text:list>
      <text:p text:style-name="Standard"/>
      <text:p text:style-name="Standard"/>
      <text:p text:style-name="Standard"/>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8"><text:span text:style-name="Strong_20_Emphasis"><text:span text:style-name="T5">Feature</text:span></text:span></text:p>
            </table:table-cell>
            <table:table-cell table:style-name="Table1.A1" office:value-type="string">
              <text:p text:style-name="P8"><text:span text:style-name="Strong_20_Emphasis"><text:span text:style-name="T5">Zapier (Traditional/Current)</text:span></text:span></text:p>
            </table:table-cell>
            <table:table-cell table:style-name="Table1.A1" office:value-type="string">
              <text:p text:style-name="P8"><text:span text:style-name="Strong_20_Emphasis"><text:span text:style-name="T5">NexusMCP (Idea)</text:span></text:span></text:p>
            </table:table-cell>
          </table:table-row>
        </table:table-header-rows>
        <table:table-row>
          <table:table-cell table:style-name="Table1.A1" office:value-type="string">
            <text:p text:style-name="P9">Logic</text:p>
          </table:table-cell>
          <table:table-cell table:style-name="Table1.A1" office:value-type="string">
            <text:p text:style-name="P10">"If-This-Then-That" (Deterministic)</text:p>
          </table:table-cell>
          <table:table-cell table:style-name="Table1.A1" office:value-type="string">
            <text:p text:style-name="P10">"Goal-Based" (Agentic Reasoning)</text:p>
          </table:table-cell>
        </table:table-row>
        <table:table-row>
          <table:table-cell table:style-name="Table1.A1" office:value-type="string">
            <text:p text:style-name="P9">Setup</text:p>
          </table:table-cell>
          <table:table-cell table:style-name="Table1.A1" office:value-type="string">
            <text:p text:style-name="P10">Manual Field Mapping</text:p>
          </table:table-cell>
          <table:table-cell table:style-name="Table1.A1" office:value-type="string">
            <text:p text:style-name="P10"><text:span text:style-name="T3">Runtime Discovery</text:span> (Self-Mapping)</text:p>
          </table:table-cell>
        </table:table-row>
        <table:table-row>
          <table:table-cell table:style-name="Table1.A1" office:value-type="string">
            <text:p text:style-name="P9">Cost</text:p>
          </table:table-cell>
          <table:table-cell table:style-name="Table1.A1" office:value-type="string">
            <text:p text:style-name="P10">Per Task (Expensive at scale)</text:p>
          </table:table-cell>
          <table:table-cell table:style-name="Table1.A1" office:value-type="string">
            <text:p text:style-name="P10">Per Compute/Token (Scalable)</text:p>
          </table:table-cell>
        </table:table-row>
        <table:table-row>
          <table:table-cell table:style-name="Table1.A1" office:value-type="string">
            <text:p text:style-name="P9">Maintenance</text:p>
          </table:table-cell>
          <table:table-cell table:style-name="Table1.A1" office:value-type="string">
            <text:p text:style-name="P10">Manual updates when APIs change</text:p>
          </table:table-cell>
          <table:table-cell table:style-name="Table1.A1" office:value-type="string">
            <text:p text:style-name="P10">Automatic (Agents adapt to new tools)</text:p>
          </table:table-cell>
        </table:table-row>
        <table:table-row>
          <table:table-cell table:style-name="Table1.A1" office:value-type="string">
            <text:p text:style-name="P9">Security</text:p>
          </table:table-cell>
          <table:table-cell table:style-name="Table1.A1" office:value-type="string">
            <text:p text:style-name="P10">General API Access</text:p>
          </table:table-cell>
          <table:table-cell table:style-name="Table1.A1" office:value-type="string">
            <text:p text:style-name="P9">Granular RBAC Proxy</text:p>
          </table:table-cell>
        </table:table-row>
      </table:table>
      <text:p text:style-name="Standard"/>
      <text:p text:style-name="Text_20_body">To win, your product must fill the three gaps these companies are ignoring:</text:p>
      <text:list text:style-name="L4">
        <text:list-item>
          <text:p text:style-name="P11"><text:span text:style-name="T3">The No-Code UX:</text:span> MintMCP is for devs; Salesforce is for Admins. Your product should be for <text:span text:style-name="T3">Business Owners</text:span> who want to describe a workflow in English and see it happen.</text:p>
        </text:list-item>
        <text:list-item>
          <text:p text:style-name="P11"><text:span text:style-name="T3">The Security Proxy:</text:span> By building the <text:span text:style-name="T3">RBAC (Role-Based Access Control)</text:span> proxy you described, you solve the biggest fear enterprises have about AI: <text:span text:style-name="T2">"What if the agent sees data it shouldn't?"</text:span></text:p>
        </text:list-item>
        <text:list-item>
          <text:p text:style-name="P11"><text:span text:style-name="T3">The Hybrid Router:</text:span> No one else is explicitly talking about automatically switching between <text:span text:style-name="T3">Agentic Reasoning</text:span> (expensive/smart) and <text:span text:style-name="T3">REST Batching</text:span> (cheap/fast). This makes your business model much more profitable than theirs.</text:p>
        </text:list-item>
      </text:list>
      <text:p text:style-name="Text_20_body">You are effectively proposing the <text:span text:style-name="T3">Next Generation of Middleware</text:span>. If Zapier was the "Internet of Pipes," you are building the "Internet of Agents."</text:p>
      <text:p text:style-name="Standard"/>
      <text:h text:style-name="Heading_20_3" text:outline-level="3"><text:bookmark text:name="setup-and-time-to-action"/><text:soft-page-break/>Setup and Time-to-Action</text:h>
      <text:p text:style-name="Text_20_body">Zapier MCP wins this category decisively. If your agent needs to touch ten different apps, you configure one MCP server instead of ten. The time savings during initial setup are real, especially if you’re prototyping or testing an agent’s capabilities quickly.</text:p>
      <text:p text:style-name="Text_20_body">Native integrations require more upfront work. You need to find the server, review its documentation, set up credentials, handle config syntax correctly, and test each connection. Multiply that by ten tools and the setup burden becomes significant.</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Google Sans Text" svg:font-family="'Google Sans Text', sans-serif"/>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Noto Serif" fo:font-family="'Noto Serif'" style:font-family-generic="roman" style:font-pitch="variable" fo:font-size="12pt" fo:font-weight="bold" style:font-name-asian="Noto Sans1" style:font-family-asian="'Noto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Noto Serif" fo:font-family="'Noto Serif'" style:font-family-generic="roman" style:font-pitch="variable" fo:font-size="14pt" fo:font-weight="bold" style:font-name-asian="Noto Sans1"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11T21:01:42.698224457</meta:creation-date>
    <dc:date>2026-05-11T21:18:39.293272231</dc:date>
    <meta:editing-duration>PT16M57S</meta:editing-duration>
    <meta:editing-cycles>2</meta:editing-cycles>
    <meta:generator>LibreOffice/25.8.6.2$Linux_X86_64 LibreOffice_project/580$Build-2</meta:generator>
    <meta:print-date>2026-05-11T21:12:18.037677264</meta:print-date>
    <meta:printed-by>PDF files</meta:printed-by>
    <meta:document-statistic meta:table-count="1" meta:image-count="0" meta:object-count="0" meta:page-count="3" meta:paragraph-count="43" meta:word-count="596" meta:character-count="3788" meta:non-whitespace-character-count="3249"/>
  </office:meta>
</office:document-meta>
</file>